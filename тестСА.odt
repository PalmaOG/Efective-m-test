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Media/1.png" manifest:media-type="image/png"/>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hem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co:time-zone="10800" office:version="1.2">
  <office:font-face-decls>
    <style:font-face style:name="Times New Roman" svg:font-family="Times New Roman"/>
  </office:font-face-decls>
  <office:automatic-styles>
    <style:style style:family="paragraph" style:name="P25" style:parent-style-name="Standard">
      <style:text-properties fo:font-family="Times New Roman" fo:font-weight="bold" style:font-name="Times New Roman" style:font-weight-asian="bold" style:font-weight-complex="bold"/>
    </style:style>
    <style:style co:numbering-list-id="list_17" style:family="paragraph" style:list-style-name="numList_2" style:name="P23" style:parent-style-name="Standard"/>
    <style:style co:numbering-list-id="list_16" style:family="paragraph" style:list-style-name="numList_2" style:name="P22" style:parent-style-name="Standard"/>
    <style:style co:numbering-list-id="list_11" style:family="paragraph" style:list-style-name="numList_2" style:name="P17" style:parent-style-name="Standard"/>
    <style:style style:family="paragraph" style:name="P24" style:parent-style-name="Standard">
      <style:text-properties fo:font-family="Times New Roman" style:font-name="Times New Roman"/>
    </style:style>
    <style:style co:numbering-list-id="list_13" style:family="paragraph" style:list-style-name="numList_2" style:name="P19" style:parent-style-name="Standard"/>
    <style:style co:numbering-list-id="list_10" style:family="paragraph" style:list-style-name="numList_2" style:name="P16" style:parent-style-name="Standard"/>
    <style:style co:numbering-list-id="list_14" style:family="paragraph" style:list-style-name="numList_2" style:name="P20" style:parent-style-name="Standard"/>
    <style:style co:numbering-list-id="list_9" style:family="paragraph" style:list-style-name="numList_2" style:name="P15" style:parent-style-name="Standard"/>
    <style:style co:numbering-list-id="list_4" style:family="paragraph" style:list-level="2" style:list-style-name="numList_2" style:name="P10" style:parent-style-name="Standard"/>
    <style:style co:numbering-list-id="list_5" style:family="paragraph" style:list-style-name="numList_2" style:name="P11" style:parent-style-name="Standard"/>
    <style:style co:numbering-list-id="list_7" style:family="paragraph" style:list-level="2" style:list-style-name="numList_2" style:name="P13" style:parent-style-name="Standard"/>
    <style:style co:numbering-list-id="list_2" style:family="paragraph" style:list-style-name="numList_2" style:name="P8" style:parent-style-name="Standard"/>
    <style:style co:numbering-list-id="list_12" style:family="paragraph" style:list-style-name="numList_2" style:name="P18" style:parent-style-name="Standard"/>
    <style:style co:numbering-list-id="list_1" style:family="paragraph" style:list-style-name="numList_1" style:name="P6" style:parent-style-name="Standard">
      <style:paragraph-properties fo:line-height="150%"/>
    </style:style>
    <style:style co:numbering-list-id="list_3" style:family="paragraph" style:list-level="2" style:list-style-name="numList_2" style:name="P9" style:parent-style-name="Standard"/>
    <style:style style:family="paragraph" style:name="P5" style:parent-style-name="Standard">
      <style:paragraph-properties fo:line-height="150%"/>
      <style:text-properties fo:font-family="Times New Roman" fo:font-style="normal" fo:font-weight="normal" style:font-name="Times New Roman" style:font-style-asian="normal" style:font-style-complex="normal" style:font-weight-asian="normal" style:font-weight-complex="normal"/>
    </style:style>
    <style:style co:numbering-list-id="list_8" style:family="paragraph" style:list-style-name="numList_2" style:name="P14" style:parent-style-name="Standard"/>
    <style:style style:family="paragraph" style:name="P4" style:parent-style-name="Standard">
      <style:paragraph-properties fo:margin-bottom="6pt" fo:margin-left="0pt" fo:margin-right="6pt" fo:margin-top="6pt" fo:text-align="start" fo:text-indent="0pt"/>
    </style:style>
    <style:style co:numbering-list-id="list_6" style:family="paragraph" style:list-level="2" style:list-style-name="numList_2" style:name="P12" style:parent-style-name="Standard"/>
    <style:style co:numbering-list-id="list_15" style:family="paragraph" style:list-style-name="numList_2" style:name="P21" style:parent-style-name="Standard"/>
    <style:style style:family="paragraph" style:name="P3" style:parent-style-name="Standard">
      <style:paragraph-properties fo:line-height="150%"/>
    </style:style>
    <style:style style:family="paragraph" style:name="P26" style:parent-style-name="Standard">
      <style:text-properties fo:font-family="Times New Roman" fo:font-weight="normal" style:font-name="Times New Roman" style:font-weight-asian="normal" style:font-weight-complex="normal"/>
    </style:style>
    <style:style style:family="paragraph" style:name="P2" style:parent-style-name="Standard">
      <style:paragraph-properties fo:line-height="150%"/>
      <style:text-properties fo:font-family="Times New Roman" fo:font-style="normal" fo:font-weight="bold" style:font-name="Times New Roman" style:font-style-asian="normal" style:font-style-complex="normal" style:font-weight-asian="bold" style:font-weight-complex="bold"/>
    </style:style>
    <style:style co:numbering-list-id="list_1" style:family="paragraph" style:list-style-name="numList_1" style:name="P7" style:parent-style-name="Standard"/>
    <style:style style:family="paragraph" style:master-page-name="Standard" style:name="P1" style:parent-style-name="Standard">
      <style:paragraph-properties fo:line-height="150%"/>
    </style:style>
    <style:style style:family="text" style:name="T6">
      <style:text-properties fo:font-family="Times New Roman" fo:font-weight="normal" style:font-name="Times New Roman" style:font-weight-asian="normal" style:font-weight-complex="normal"/>
    </style:style>
    <style:style style:family="text" style:name="T5">
      <style:text-properties fo:font-family="Times New Roman" fo:font-weight="bold" style:font-name="Times New Roman" style:font-weight-asian="bold" style:font-weight-complex="bold"/>
    </style:style>
    <style:style style:family="text" style:name="T3">
      <style:text-properties fo:font-family="Times New Roman" style:font-name="Times New Roman"/>
    </style:style>
    <style:style style:family="text" style:name="T2">
      <style:text-properties fo:font-family="Times New Roman" fo:font-style="normal" fo:font-weight="normal" style:font-name="Times New Roman" style:font-style-asian="normal" style:font-style-complex="normal" style:font-weight-asian="normal" style:font-weight-complex="normal"/>
    </style:style>
    <style:style style:family="text" style:name="T4">
      <style:text-properties fo:background-color="transparent" fo:color="#000000" fo:font-family="Times New Roman" fo:font-size="14pt" fo:font-style="normal" fo:font-weight="normal" fo:letter-spacing="0pt" fo:text-transform="none" style:font-name="Times New Roman" style:font-size-asian="14pt" style:font-size-complex="14pt" style:font-style-asian="normal" style:font-style-complex="normal" style:font-weight-asian="normal" style:font-weight-complex="normal">
        <co:background-theme-color>
          <value>
            <rgba>00000000</rgba>
          </value>
        </co:background-theme-color>
        <co:theme-color>
          <value>
            <rgba>000000FF</rgba>
          </value>
        </co:theme-color>
      </style:text-properties>
    </style:style>
    <style:style style:family="text" style:name="T1">
      <style:text-properties fo:font-family="Times New Roman" fo:font-style="normal" fo:font-weight="bold" style:font-name="Times New Roman" style:font-style-asian="normal" style:font-style-complex="normal" style:font-weight-asian="bold" style:font-weight-complex="bold"/>
    </style:style>
    <style:style style:family="table" style:name="Table1">
      <co:linked-style style-name="Cell1"/>
      <style:table-properties table:display="true"/>
    </style:style>
    <style:style style:family="table-cell" style:name="Cell1">
      <co:linked-style style-name="Table1"/>
      <style:table-cell-properties co:border-horizontal="0.5pt solid #000000" co:border-vertical="0.5pt solid #000000" fo:border-bottom="0.5pt solid #000000" fo:border-left="0.5pt solid #000000" fo:border-right="0.5pt solid #000000" fo:border-top="0.5pt solid #000000">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co:border-vertical-theme-color>
          <value>
            <rgba>000000FF</rgba>
          </value>
        </co:border-vertical-theme-color>
        <co:border-horizontal-theme-color>
          <value>
            <rgba>000000FF</rgba>
          </value>
        </co:border-horizontal-theme-color>
      </style:table-cell-properties>
      <style:graphic-properties/>
      <style:paragraph-properties fo:border-bottom="0.5pt solid #000000" fo:border-left="0.5pt solid #000000" fo:border-right="0.5pt solid #000000" fo:border-top="0.5pt solid #000000">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style:paragraph-properties>
    </style:style>
    <style:style style:family="table-column" style:name="Col1">
      <style:table-column-properties style:column-width="246.6288pt" style:use-optimal-column-width="true"/>
    </style:style>
    <style:style style:family="table-row" style:name="Row2">
      <style:table-row-properties style:min-row-height="11.0003pt" style:use-optimal-row-height="true"/>
    </style:style>
    <style:style style:family="table-row" style:name="Row1">
      <style:table-row-properties style:min-row-height="18pt" style:use-optimal-row-height="true"/>
    </style:style>
    <style:style style:family="table-cell" style:name="Cell2">
      <style:table-cell-properties co:border-horizontal="0.5pt solid #000000" co:border-vertical="0.5pt solid #000000" fo:border-bottom="0.5pt solid #000000" fo:border-left="0.5pt solid #000000" fo:border-right="0.5pt solid #000000" fo:border-top="0.5pt solid #000000" fo:padding-left="5.4pt" fo:padding-right="5.4pt" fo:wrap-option="wrap" style:vertical-align="top">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co:border-vertical-theme-color>
          <value>
            <rgba>000000FF</rgba>
          </value>
        </co:border-vertical-theme-color>
        <co:border-horizontal-theme-color>
          <value>
            <rgba>000000FF</rgba>
          </value>
        </co:border-horizontal-theme-color>
      </style:table-cell-properties>
      <style:graphic-properties draw:textarea-vertical-align="top" fo:padding-left="5.4pt" fo:padding-right="5.4pt"/>
      <style:paragraph-properties fo:border-bottom="0.5pt solid #000000" fo:border-left="0.5pt solid #000000" fo:border-right="0.5pt solid #000000" fo:border-top="0.5pt solid #000000">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style:paragraph-properties>
      <style:text-properties fo:font-family="Times New Roman" style:font-name="Times New Roman"/>
    </style:style>
    <style:style style:family="graphic" style:name="Frm1" style:parent-style-name="Frame">
      <style:graphic-properties/>
    </style:style>
  </office:automatic-styles>
  <office:body>
    <office:text>
      <text:tracked-changes text:track-changes="false"/>
      <text:p co:para-mark-style-name="T1" text:style-name="P1"><text:span text:style-name="T1">Задание 1.</text:span></text:p>
      <text:p co:para-mark-style-name="T1" text:style-name="P2"/>
      <text:p co:para-mark-style-name="T2" text:style-name="P3"><text:span text:style-name="T2">Пункт 1.</text:span></text:p>
      <table:table co:columns-count="2" co:grouping-summary-below="true" co:grouping-summary-right="true" co:rows-count="8" co:show-zero-value="true" table:style-name="Table1" table:use-banding-columns-styles="false" table:use-banding-rows-styles="false" table:use-first-column-styles="false" table:use-first-row-styles="false" table:use-last-column-styles="false" table:use-last-row-styles="false">
        <table:table-column table:style-name="Col1"/>
        <table:table-column table:style-name="Col1"/>
        <table:table-row table:style-name="Row1">
          <table:table-cell office:value-type="string" table:style-name="Cell2">
            <text:p co:para-mark-style-name="T3" text:style-name="Standard"><text:span text:style-name="T3">Номер пункта\недочет</text:span></text:p>
          </table:table-cell>
          <table:table-cell office:value-type="string" table:style-name="Cell2">
            <text:p co:para-mark-style-name="T3" text:style-name="Standard"><text:span text:style-name="T3">Проблема</text:span></text:p>
          </table:table-cell>
        </table:table-row>
        <table:table-row table:style-name="Row1">
          <table:table-cell office:value-type="string" table:style-name="Cell2">
            <text:p co:para-mark-style-name="T3" text:style-name="Standard"><text:span text:style-name="T3">2,9</text:span></text:p>
          </table:table-cell>
          <table:table-cell office:value-type="string" table:style-name="Cell2">
            <text:p co:para-mark-style-name="T4" text:style-name="P4"><text:span text:style-name="T3">Пункт 2 говорит, что количество можно менять минимум до 1, а удаление — только отдельной кнопкой (т.е. значение 0 запрещено). Пункт 9 утверждает, что при уменьшении количества до 0 товар автоматически удаляется. Два взаимоисключающих сценария.</text:span></text:p>
          </table:table-cell>
        </table:table-row>
        <table:table-row table:style-name="Row1">
          <table:table-cell office:value-type="string" table:style-name="Cell2">
            <text:p co:para-mark-style-name="T3" text:style-name="Standard"><text:span text:style-name="T3">2,4,6</text:span></text:p>
          </table:table-cell>
          <table:table-cell office:value-type="string" table:style-name="Cell2">
            <text:p co:para-mark-style-name="T3" text:style-name="Standard"><text:span text:style-name="T3">Сообщение «Лимит корзины превышен» не указывает, какое именно ограничение нарушено (макс. 10 ед. одного товара, макс. 5 разных товаров, макс. 20 ед. всего). Кроме того, не описано поведение системы при ручном изменении количества уже лежащего товара, если это нарушает общие лимиты (например, пользователь вручную меняет количество до 20, превышая лимит в 10 ед. на товар или общий лимит в 20 ед.).</text:span></text:p>
          </table:table-cell>
        </table:table-row>
        <table:table-row table:style-name="Row1">
          <table:table-cell office:value-type="string" table:style-name="Cell2">
            <text:p co:para-mark-style-name="T3" text:style-name="Standard"><text:span text:style-name="T3">7,13</text:span></text:p>
          </table:table-cell>
          <table:table-cell office:value-type="string" table:style-name="Cell2">
            <text:p co:para-mark-style-name="T3" text:style-name="Standard"><text:span text:style-name="T3">Пункт 7 требует зафиксировать цену на момент добавления и не менять её никогда. Пункт 13 требует принудительно обновлять цену в корзине при изменении в каталоге. Одновременное выполнение невозможно — либо цена «заморожена», либо динамически обновляется.</text:span></text:p>
          </table:table-cell>
        </table:table-row>
        <table:table-row table:style-name="Row2">
          <table:table-cell office:value-type="string" table:style-name="Cell2">
            <text:p co:para-mark-style-name="T3" text:style-name="Standard"><text:span text:style-name="T3">10,11</text:span></text:p>
          </table:table-cell>
          <table:table-cell office:value-type="string" table:style-name="Cell2">
            <text:p co:para-mark-style-name="T3" text:style-name="Standard"><text:span text:style-name="T3">Пункт 10 допускает, что реклама «может быть», а пункт 11 ужесточает — «должна быть» по утрам и вечерам в будни. При этом «утро» и «вечер» не имеют конкретных временных границ, не указан часовой пояс. Остаётся неясной обязательность рекламы и её расписание.</text:span></text:p>
          </table:table-cell>
        </table:table-row>
        <table:table-row table:style-name="Row1">
          <table:table-cell office:value-type="string" table:style-name="Cell2">
            <text:p co:para-mark-style-name="T3" text:style-name="Standard"><text:span text:style-name="T3">12</text:span></text:p>
          </table:table-cell>
          <table:table-cell office:value-type="string" table:style-name="Cell2">
            <text:p co:para-mark-style-name="T3" text:style-name="Standard"><text:span text:style-name="T3">В нумерации требований отсутствует пункт 12. Возможно, было удалено важное требование либо допущена ошибка — в любом случае это пробел, который необходимо прояснить.</text:span></text:p>
          </table:table-cell>
        </table:table-row>
        <table:table-row table:style-name="Row1">
          <table:table-cell office:value-type="string" table:style-name="Cell2">
            <text:p co:para-mark-style-name="T3" text:style-name="Standard"><text:span text:style-name="T3">Не описан сценарий добавления уже присутствующего товара</text:span></text:p>
          </table:table-cell>
          <table:table-cell office:value-type="string" table:style-name="Cell2">
            <text:p co:para-mark-style-name="T3" text:style-name="Standard"><text:span text:style-name="T3">Если пользователь повторно добавляет тот же товар, неясно, должно ли суммироваться количество с существующей позицией или создаваться новая. Соответственно, не определено, как в этом сценарии проверяются лимиты (10 ед. на товар, 20 ед. всего).</text:span></text:p>
          </table:table-cell>
        </table:table-row>
        <table:table-row table:style-name="Row1">
          <table:table-cell office:value-type="string" table:style-name="Cell2">
            <text:p co:para-mark-style-name="T3" text:style-name="Standard"><text:span text:style-name="T3">Отсутствует требование об итоговой сумме корзины</text:span></text:p>
          </table:table-cell>
          <table:table-cell office:value-type="string" table:style-name="Cell2">
            <text:p co:para-mark-style-name="T3" text:style-name="Standard"><text:span text:style-name="T3">Пункт 8 перечисляет отображаемые данные: список товаров, количество, цена за единицу, стоимость позиции. Итоговая сумма всей корзины не упомянута, что является очевидным упущением.</text:span></text:p>
          </table:table-cell>
        </table:table-row>
      </table:table>
      <text:p co:para-mark-style-name="T2" text:style-name="P5"/>
      <text:p co:para-mark-style-name="T2" text:style-name="P3"><text:span text:style-name="T2">Пункт 2.</text:span></text:p>
      <text:list text:style-name="numList_1" xml:id="list_1">
        <text:list-item>
          <text:p co:para-mark-style-name="T2" text:style-name="P6"><text:span text:style-name="T3">Пользователь может добавить товар в корзину, указав количество от 1 до 10 единиц за одну операцию.</text:span></text:p>
        </text:list-item>
        <text:list-item>
          <text:p co:para-mark-style-name="T2" text:style-name="P6"><text:span text:style-name="T3">Если добавляемый товар уже есть в корзине, то количество суммируется с су</text:span><text:span text:style-name="T3">ществующим, но не может превысить 10 единиц для данной позиции. В случае превышения суммарное количество устанавливается равным 10, а пользов</text:span><text:span text:style-name="T3">ателю показывается сообщение «Достигнут максимум 10 ед. для данного товара».</text:span></text:p>
        </text:list-item>
        <text:list-item>
          <text:p co:para-mark-style-name="T3" text:style-name="P7"><text:span text:style-name="T3">В корзине одновременно может находиться не более 5 различных товаров (позиций).</text:span></text:p>
        </text:list-item>
        <text:list-item>
          <text:p co:para-mark-style-name="T3" text:style-name="P7">Общее суммарное количество всех единиц товаров в корзине не должно превышать 20 штук.</text:p>
        </text:list-item>
        <text:list-item>
          <text:p co:para-mark-style-name="T3" text:style-name="P7">При попытке добавить новый товар (отсутствующий в корзине), когда в корзине уже есть 5<text:span text:style-name="T3"><text:s text:c="1"/></text:span>позиций, система не добавляет товар и показывает сообщение «Достигнут лимит: не более 5 разных товаров в корзине».</text:p>
        </text:list-item>
        <text:list-item>
          <text:p co:para-mark-style-name="T3" text:style-name="P7">При попытке добавить товар (новый или существующий), если в результате будет превышено общее количество 20 ед., система добавляет максимально возможное количество до лимита 20, а пользователю показывает сообщение «Достигнут общий лимит корзины – 20 ед. Добавлено X ед. из Y».</text:p>
        </text:list-item>
        <text:list-item>
          <text:p co:para-mark-style-name="T3" text:style-name="P7">Пользователь может изменить количество каждой позиции вручную (в том числе ввести значение с клавиатуры). Минимальное допустимое значение – 1.</text:p>
        </text:list-item>
        <text:list-item>
          <text:p co:para-mark-style-name="T3" text:style-name="P7">Для удаления позиции из корзины используется отдельная кнопка «Удалить» у каждой позиции. При удалении позиция удаляется полностью независимо от количества.</text:p>
        </text:list-item>
        <text:list-item>
          <text:p co:para-mark-style-name="T3" text:style-name="P7">При изменении количества позиции, если это приводит к превышению общего лимита 20 ед., система автоматически корректирует введённое значение до максимально возможного, не нарушающего лимит, и показывает сообщение «Общее количество товаров в корзине не может превышать 20 ед.».</text:p>
        </text:list-item>
        <text:list-item>
          <text:p co:para-mark-style-name="T3" text:style-name="P7"><text:s text:c="1"/>Цена товара в корзине фиксируется в момент добавления позиции (и в момент досуммирования при повторном добавлении) и не изменяется при последующих колебаниях цены в каталоге. Зафиксированная цена сохраняется до удаления позиции или до момента оформления заказа.</text:p>
        </text:list-item>
        <text:list-item>
          <text:p co:para-mark-style-name="T3" text:style-name="P7"><text:span text:style-name="T3"><text:s text:c="1"/></text:span>На странице корзины отображаются: список позиций с наименованием товара, количество, фиксированная цена за единицу, общая стоимость позиции (количество × цена), итоговая сумма всей корзины (сумма стоимостей всех позиций).</text:p>
        </text:list-item>
        <text:list-item>
          <text:p co:para-mark-style-name="T3" text:style-name="P7"><text:span text:style-name="T3"><text:s text:c="1"/></text:span>При переходе товара в статус «недоступен» (снят с продажи) позиция остаётся в корзине, но помечается как «Товар недоступен», её количество нельзя изменить, а цена сохраняется последней зафиксированной. Пользователь может только удалить такую позицию.</text:p>
        </text:list-item>
        <text:list-item>
          <text:p co:para-mark-style-name="T3" text:style-name="P7"><text:span text:style-name="T3"><text:s text:c="1"/></text:span>В корзине допускается показ рекламных блоков с другими продуктами. Отображение рекламы регулируется отдельными правилами, описанными в разделе «Реклама в корзине». (Требование пункта 11 исходного ТЗ требует уточнения у заказчика.<text:span text:style-name="T3">)</text:span></text:p>
        </text:list-item>
      </text:list>
      <text:p co:para-mark-style-name="T3" text:style-name="Standard"><text:span text:style-name="T3">Пункт 3.</text:span></text:p>
      <text:list text:style-name="numList_2" xml:id="list_2">
        <text:list-item>
          <text:p text:style-name="P8">Какая модель работы с ценой всё-таки ожидается?</text:p>
        </text:list-item>
      </text:list>
      <text:p text:style-name="Standard"/>
      <text:list text:style-name="numList_2" xml:id="list_3">
        <text:list-item>
          <text:list>
            <text:list-item>
              <text:p text:style-name="P9">Фиксация цены на момент добавления (и тогда п.13 исключается)?</text:p>
            </text:list-item>
          </text:list>
        </text:list-item>
      </text:list>
      <text:p text:style-name="Standard"/>
      <text:list text:style-name="numList_2" xml:id="list_4">
        <text:list-item>
          <text:list>
            <text:list-item>
              <text:p text:style-name="P10">Или цена динамически обновляется из каталога? Если динамически, то что делать с уже применёнными скидками и промокодами в корзине?</text:p>
            </text:list-item>
          </text:list>
        </text:list-item>
      </text:list>
      <text:p text:style-name="Standard"/>
      <text:list text:style-name="numList_2" xml:id="list_5">
        <text:list-item>
          <text:p text:style-name="P11">Как должен вести себя элемент управления количеством позиции?</text:p>
        </text:list-item>
      </text:list>
      <text:p text:style-name="Standard"/>
      <text:list text:style-name="numList_2" xml:id="list_6">
        <text:list-item>
          <text:list>
            <text:list-item>
              <text:p text:style-name="P12">Позволяет ли поле ввода установить значение 0, и если да, то это удаляет позицию или запрещено (валидация на минимум 1)?</text:p>
            </text:list-item>
          </text:list>
        </text:list-item>
      </text:list>
      <text:p text:style-name="Standard"/>
      <text:list text:style-name="numList_2" xml:id="list_7">
        <text:list-item>
          <text:list>
            <text:list-item>
              <text:p text:style-name="P13">Нужна ли отдельная кнопка удаления в любом случае или достаточно обнуления количества?</text:p>
            </text:list-item>
          </text:list>
        </text:list-item>
      </text:list>
      <text:p text:style-name="Standard"/>
      <text:list text:style-name="numList_2" xml:id="list_8">
        <text:list-item>
          <text:p text:style-name="P14">Следует ли считать разные фасовки/объёмы одного товара разными позициями или одним товаром с вариациями? (Влияет на лимит «5 разных товаров»).</text:p>
        </text:list-item>
      </text:list>
      <text:p text:style-name="Standard"/>
      <text:list text:style-name="numList_2" xml:id="list_9">
        <text:list-item>
          <text:p text:style-name="P15">Как определить «утро» и «вечер» в требовании про рекламу? Нужны конкретные интервалы (например, 08:00–11:00 и 17:00–21:00) и часовой пояс (часовой пояс пользователя, магазина, UTC?).</text:p>
        </text:list-item>
      </text:list>
      <text:p text:style-name="Standard"/>
      <text:list text:style-name="numList_2" xml:id="list_10">
        <text:list-item>
          <text:p text:style-name="P16">Действует ли рекламное правило в выходные и праздничные дни, или только в будни? (Исходная формулировка упоминает только будни).</text:p>
        </text:list-item>
      </text:list>
      <text:p text:style-name="Standard"/>
      <text:list text:style-name="numList_2" xml:id="list_11">
        <text:list-item>
          <text:p text:style-name="P17">Что показывать в корзине, если рекламных кампаний для данного времени/сегмента нет – пустое место или скрывать блок?</text:p>
        </text:list-item>
      </text:list>
      <text:p text:style-name="Standard"/>
      <text:list text:style-name="numList_2" xml:id="list_12">
        <text:list-item>
          <text:p text:style-name="P18">Должны ли лимиты корзины (5 позиций, 20 ед. всего, 10 ед. на товар) быть настраиваемыми в админ-панели или они жёстко заданы?</text:p>
        </text:list-item>
      </text:list>
      <text:p text:style-name="Standard"/>
      <text:list text:style-name="numList_2" xml:id="list_13">
        <text:list-item>
          <text:p text:style-name="P19">Как обрабатывать ситуацию, когда товар в корзине был полностью удалён из каталога (не просто недоступен, а удалён администратором)? Показывать ли его в корзине и давать ли возможность оформить заказ?</text:p>
        </text:list-item>
      </text:list>
      <text:p text:style-name="Standard"/>
      <text:list text:style-name="numList_2" xml:id="list_14">
        <text:list-item>
          <text:p text:style-name="P20">Применяются ли лимиты к рекламным товарам (например, если рекламный блок предлагает добавить товар в корзину по клику, должны ли соблюдаться те же ограничения)?</text:p>
        </text:list-item>
      </text:list>
      <text:p text:style-name="Standard"/>
      <text:list text:style-name="numList_2" xml:id="list_15">
        <text:list-item>
          <text:p text:style-name="P21">Какое поведение ожидается при попытке изменить количество позиции в корзине до величины, превышающей остаток на складе? Нужно ли учитывать складские остатки на этапе корзины?</text:p>
        </text:list-item>
      </text:list>
      <text:p text:style-name="Standard"/>
      <text:list text:style-name="numList_2" xml:id="list_16">
        <text:list-item>
          <text:p text:style-name="P22">Что означает пункт 5 исходного ТЗ «Товары в корзине могут быть разные» – это уточнение, что допускается смешанный состав (и тогда оно тривиально), или есть ограничение, что некоторые категории нельзя смешивать?</text:p>
        </text:list-item>
      </text:list>
      <text:p text:style-name="Standard"/>
      <text:list text:style-name="numList_2" xml:id="list_17">
        <text:list-item>
          <text:p co:para-mark-style-name="T3" text:style-name="P23">Потерян ли между пунктами 11 и 13 ещё один пункт (12) намеренно, или произошла ошибка нумерации? Если он существовал, прошу предоставить его текст.</text:p>
        </text:list-item>
      </text:list>
      <text:p co:para-mark-style-name="T3" text:style-name="P24"/>
      <text:p co:para-mark-style-name="T3" text:style-name="P24"/>
      <text:p co:para-mark-style-name="T5" text:style-name="Standard"><text:span text:style-name="T5">Задание 2.</text:span></text:p>
      <text:p co:para-mark-style-name="T5" text:style-name="P25"/>
      <text:p co:para-mark-style-name="T6" text:style-name="Standard"><text:span text:style-name="T6">Пункт 1.</text:span></text:p>
      <text:p co:para-mark-style-name="T6" text:style-name="P26"/>
      <text:p co:para-mark-style-name="T6" text:style-name="P26"/>
      <text:p co:para-mark-style-name="T6" text:style-name="P26"/>
      <text:p co:para-mark-style-name="T6" text:style-name="P26"/>
      <text:p text:style-name="Standard">GET /api/v1/partners/stores HTTP/1.1</text:p>
      <text:p text:style-name="Standard">Host: api.petrushka-zelenaya.ru</text:p>
      <text:p text:style-name="Standard">Accept: application/json</text:p>
      <text:p co:para-mark-style-name="T6" text:style-name="Standard">Authorization: Bearer &lt;access_token&gt;</text:p>
      <text:p co:para-mark-style-name="T6" text:style-name="P26"/>
      <text:p co:para-mark-style-name="T6" text:style-name="Standard"><text:span text:style-name="T6">Пункт 2.</text:span></text:p>
      <text:p co:para-mark-style-name="T6" text:style-name="P26"/>
      <text:p text:style-name="Standard">{</text:p>
      <text:p text:style-name="Standard"><text:s text:c="2"/>"success": true,</text:p>
      <text:p text:style-name="Standard"><text:s text:c="2"/>"data": [</text:p>
      <text:p text:style-name="Standard"><text:s text:c="4"/>{</text:p>
      <text:p text:style-name="Standard"><text:s text:c="6"/>"id": "store_01",</text:p>
      <text:p text:style-name="Standard"><text:s text:c="6"/>"name": "METRO",</text:p>
      <text:p text:style-name="Standard"><text:s text:c="6"/>"logoUrl": "https://cdn.petrushka-zelenaya.ru/logos/store_01.png",</text:p>
      <text:p text:style-name="Standard"><text:s text:c="6"/>"nearestDeliveryTime": "Сегодня, 21:00–23:00",</text:p>
      <text:p text:style-name="Standard"><text:s text:c="6"/>"externalUrl": "https://zeleny-dvorik.ru?ref=petrushka"</text:p>
      <text:p text:style-name="Standard"><text:s text:c="4"/>},</text:p>
      <text:p text:style-name="Standard"><text:s text:c="4"/>{</text:p>
      <text:p text:style-name="Standard"><text:s text:c="6"/>"id": "store_02",</text:p>
      <text:p text:style-name="Standard"><text:s text:c="6"/>"name": "Ашан",</text:p>
      <text:p text:style-name="Standard"><text:s text:c="6"/>"logoUrl": "https://cdn.petrushka-zelenaya.ru/logos/store_02.png",</text:p>
      <text:p text:style-name="Standard"><text:s text:c="6"/>"nearestDeliveryTime": "Сегодня, 18:00–20:00",</text:p>
      <text:p text:style-name="Standard"><text:s text:c="6"/>"externalUrl": "https://dary-prirodi.ru?partner=petrushka"</text:p>
      <text:p text:style-name="Standard"><text:s text:c="4"/>},</text:p>
      <text:p text:style-name="Standard"><text:s text:c="4"/>{</text:p>
      <text:p text:style-name="Standard"><text:s text:c="6"/>"id": "store_03",</text:p>
      <text:p text:style-name="Standard"><text:s text:c="6"/>"name": "ВкусВил",</text:p>
      <text:p text:style-name="Standard"><text:s text:c="6"/>"logoUrl": "https://cdn.petrushka-zelenaya.ru/logos/store_03.png",</text:p>
      <text:p text:style-name="Standard"><text:s text:c="6"/>"nearestDeliveryTime": "Бстрая доставка, от 20 до 60 минут",</text:p>
      <text:p text:style-name="Standard"><text:s text:c="6"/>"externalUrl": "https://eco-lavka.ru/partner/petrushka"</text:p>
      <text:p text:style-name="Standard"><text:s text:c="4"/>}</text:p>
      <text:p text:style-name="Standard"><text:s text:c="2"/>],</text:p>
      <text:p text:style-name="Standard"><text:s text:c="2"/>"meta": {</text:p>
      <text:p text:style-name="Standard"><text:s text:c="4"/>"total": 3,</text:p>
      <text:p text:style-name="Standard"><text:s text:c="4"/>"page": 1,</text:p>
      <text:p text:style-name="Standard"><text:s text:c="4"/>"limit": 20</text:p>
      <text:p text:style-name="Standard"><text:s text:c="2"/>}</text:p>
      <text:p co:para-mark-style-name="T6" text:style-name="Standard">}</text:p>
      <text:p co:para-mark-style-name="T6" text:style-name="P26"/>
      <text:p co:para-mark-style-name="T6" text:style-name="P26"/>
      <text:p co:para-mark-style-name="T6" text:style-name="P26"/>
      <text:p co:para-mark-style-name="T6" text:style-name="P26"/>
      <text:p co:para-mark-style-name="T6" text:style-name="P26"/>
      <text:p co:para-mark-style-name="T5" text:style-name="Standard"><text:span text:style-name="T5">Задание 3.</text:span></text:p>
      <text:p co:para-mark-style-name="T5" text:style-name="P25"/>
      <text:p co:para-mark-style-name="T5" text:style-name="P25"/>
      <text:p co:para-mark-style-name="T6" text:style-name="Standard"><draw:frame draw:style-name="Frm1" svg:height="321.7368pt" svg:width="493.2576pt" text:anchor-type="as-char"><draw:image xlink:href="Media/1.png" xlink:type="simple"/></draw:frame></text:p>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Courier New" svg:font-family="Courier New"/>
    <style:font-face style:name="Symbol" svg:font-family="Symbol"/>
    <style:font-face style:name="Wingdings" svg:font-family="Wingdings"/>
    <style:font-face style:name="XO Thames" svg:font-family="XO Thames"/>
  </office:font-face-decls>
  <office:styles>
    <style:default-style style:family="graphic">
      <style:graphic-properties draw:auto-grow-height="false" fo:padding-bottom="3.6pt" fo:padding-left="3.6pt" fo:padding-right="3.6pt" fo:padding-top="3.6pt" fo:wrap-option="wrap"/>
    </style:default-style>
    <style:default-style style:family="paragraph">
      <style:paragraph-properties fo:line-height="100%" fo:margin-bottom="0pt" fo:margin-left="0pt" fo:margin-right="0pt" fo:margin-top="0pt" fo:text-align="start" fo:text-indent="0pt" style:tab-stop-distance="36pt"/>
      <style:text-properties fo:background-color="transparent" fo:color="#000000" fo:font-family="XO Thames" fo:font-size="12pt" fo:letter-spacing="0pt" style:font-name="XO Thames" style:font-size-asian="12pt" style:font-size-complex="12pt">
        <co:background-theme-color>
          <value>
            <rgba>00000000</rgba>
          </value>
        </co:background-theme-color>
        <co:theme-color>
          <value>
            <rgba>000000FF</rgba>
          </value>
        </co:theme-color>
      </style:text-properties>
    </style:default-style>
    <style:default-style style:family="table">
      <style:table-properties table:border-model="collapsing"/>
    </style:default-style>
    <style:style style:display-name="Contents 2" style:family="paragraph" style:name="Contents_2" style:next-style-name="Standard">
      <style:paragraph-properties fo:margin-left="10pt" fo:text-align="start" fo:text-indent="0pt"/>
      <style:text-properties fo:font-family="XO Thames" fo:font-size="14pt" style:font-name="XO Thames" style:font-size-asian="14pt" style:font-size-complex="14pt"/>
    </style:style>
    <style:style style:display-name="Contents 4" style:family="paragraph" style:name="Contents_4" style:next-style-name="Standard">
      <style:paragraph-properties fo:margin-left="30pt" fo:text-align="start" fo:text-indent="0pt"/>
      <style:text-properties fo:font-family="XO Thames" fo:font-size="14pt" style:font-name="XO Thames" style:font-size-asian="14pt" style:font-size-complex="14pt"/>
    </style:style>
    <style:style style:display-name="Contents 6" style:family="paragraph" style:name="Contents_6" style:next-style-name="Standard">
      <style:paragraph-properties fo:margin-left="50pt" fo:text-align="start" fo:text-indent="0pt"/>
      <style:text-properties fo:font-family="XO Thames" fo:font-size="14pt" style:font-name="XO Thames" style:font-size-asian="14pt" style:font-size-complex="14pt"/>
    </style:style>
    <style:style style:display-name="Contents 7" style:family="paragraph" style:name="Contents_7" style:next-style-name="Standard">
      <style:paragraph-properties fo:margin-left="60pt" fo:text-align="start" fo:text-indent="0pt"/>
      <style:text-properties fo:font-family="XO Thames" fo:font-size="14pt" style:font-name="XO Thames" style:font-size-asian="14pt" style:font-size-complex="14pt"/>
    </style:style>
    <style:style co:is-default-style="true" style:display-name="Standard" style:family="paragraph" style:name="Standard">
      <style:paragraph-properties fo:line-height="100%" fo:text-align="justify"/>
      <style:text-properties fo:font-family="XO Thames" fo:font-size="14pt" style:font-name="XO Thames" style:font-size-asian="14pt" style:font-size-complex="14pt"/>
    </style:style>
    <style:style style:default-outline-level="3" style:display-name="Heading 3" style:family="paragraph" style:list-style-name="" style:name="Heading_3" style:next-style-name="Standard">
      <style:paragraph-properties fo:margin-bottom="6pt" fo:margin-top="6pt" fo:text-align="justify"/>
      <style:text-properties fo:font-family="XO Thames" fo:font-size="13pt" fo:font-weight="bold" style:font-name="XO Thames" style:font-size-asian="13pt" style:font-size-complex="13pt" style:font-weight-asian="bold" style:font-weight-complex="bold"/>
    </style:style>
    <style:style style:display-name="Contents 3" style:family="paragraph" style:name="Contents_3" style:next-style-name="Standard">
      <style:paragraph-properties fo:margin-left="20pt" fo:text-align="start" fo:text-indent="0pt"/>
      <style:text-properties fo:font-family="XO Thames" fo:font-size="14pt" style:font-name="XO Thames" style:font-size-asian="14pt" style:font-size-complex="14pt"/>
    </style:style>
    <style:style style:default-outline-level="5" style:display-name="Heading 5" style:family="paragraph" style:list-style-name="" style:name="Heading_5" style:next-style-name="Standard">
      <style:paragraph-properties fo:margin-bottom="6pt" fo:margin-top="6pt" fo:text-align="justify"/>
      <style:text-properties fo:font-family="XO Thames" fo:font-size="11pt" fo:font-weight="bold" style:font-name="XO Thames" style:font-size-asian="11pt" style:font-size-complex="11pt" style:font-weight-asian="bold" style:font-weight-complex="bold"/>
    </style:style>
    <style:style style:default-outline-level="1" style:display-name="Heading 1" style:family="paragraph" style:list-style-name="" style:name="Heading_1" style:next-style-name="Standard">
      <style:paragraph-properties fo:margin-bottom="6pt" fo:margin-top="6pt" fo:text-align="justify"/>
      <style:text-properties fo:font-family="XO Thames" fo:font-size="16pt" fo:font-weight="bold" style:font-name="XO Thames" style:font-size-asian="16pt" style:font-size-complex="16pt" style:font-weight-asian="bold" style:font-weight-complex="bold"/>
    </style:style>
    <style:style style:display-name="Internet link" style:family="paragraph" style:name="Internet_link">
      <style:text-properties fo:color="#0000FF" style:text-underline-style="solid">
        <co:theme-color>
          <value>
            <rgba>0000FFFF</rgba>
          </value>
        </co:theme-color>
      </style:text-properties>
    </style:style>
    <style:style style:display-name="Footnote" style:family="paragraph" style:name="Footnote">
      <style:paragraph-properties fo:margin-left="0pt" fo:text-align="justify" fo:text-indent="42.5448pt"/>
      <style:text-properties fo:font-family="XO Thames" fo:font-size="11pt" style:font-name="XO Thames" style:font-size-asian="11pt" style:font-size-complex="11pt"/>
    </style:style>
    <style:style style:display-name="Contents 1" style:family="paragraph" style:name="Contents_1" style:next-style-name="Standard">
      <style:paragraph-properties fo:margin-left="0pt" fo:text-align="start" fo:text-indent="0pt"/>
      <style:text-properties fo:font-family="XO Thames" fo:font-size="14pt" fo:font-weight="bold" style:font-name="XO Thames" style:font-size-asian="14pt" style:font-size-complex="14pt" style:font-weight-asian="bold" style:font-weight-complex="bold"/>
    </style:style>
    <style:style style:display-name="Header and Footer" style:family="paragraph" style:name="Header_and_Footer">
      <style:paragraph-properties fo:line-height="100%" fo:text-align="justify"/>
      <style:text-properties fo:font-family="XO Thames" fo:font-size="10pt" style:font-name="XO Thames" style:font-size-asian="10pt" style:font-size-complex="10pt"/>
    </style:style>
    <style:style style:display-name="Contents 9" style:family="paragraph" style:name="Contents_9" style:next-style-name="Standard">
      <style:paragraph-properties fo:margin-left="80pt" fo:text-align="start" fo:text-indent="0pt"/>
      <style:text-properties fo:font-family="XO Thames" fo:font-size="14pt" style:font-name="XO Thames" style:font-size-asian="14pt" style:font-size-complex="14pt"/>
    </style:style>
    <style:style style:display-name="Contents 8" style:family="paragraph" style:name="Contents_8" style:next-style-name="Standard">
      <style:paragraph-properties fo:margin-left="70pt" fo:text-align="start" fo:text-indent="0pt"/>
      <style:text-properties fo:font-family="XO Thames" fo:font-size="14pt" style:font-name="XO Thames" style:font-size-asian="14pt" style:font-size-complex="14pt"/>
    </style:style>
    <style:style style:display-name="Contents 5" style:family="paragraph" style:name="Contents_5" style:next-style-name="Standard">
      <style:paragraph-properties fo:margin-left="40pt" fo:text-align="start" fo:text-indent="0pt"/>
      <style:text-properties fo:font-family="XO Thames" fo:font-size="14pt" style:font-name="XO Thames" style:font-size-asian="14pt" style:font-size-complex="14pt"/>
    </style:style>
    <style:style style:display-name="Subtitle" style:family="paragraph" style:name="Subtitle" style:next-style-name="Standard">
      <style:paragraph-properties fo:text-align="justify"/>
      <style:text-properties fo:font-family="XO Thames" fo:font-size="12pt" fo:font-style="italic" style:font-name="XO Thames" style:font-size-asian="12pt" style:font-size-complex="12pt" style:font-style-asian="italic" style:font-style-complex="italic"/>
    </style:style>
    <style:style style:display-name="Title" style:family="paragraph" style:name="Title" style:next-style-name="Standard">
      <style:paragraph-properties fo:margin-bottom="28.35pt" fo:margin-top="28.35pt" fo:text-align="center"/>
      <style:text-properties fo:font-family="XO Thames" fo:font-size="20pt" fo:font-weight="bold" fo:text-transform="uppercase" style:font-name="XO Thames" style:font-size-asian="20pt" style:font-size-complex="20pt" style:font-weight-asian="bold" style:font-weight-complex="bold"/>
    </style:style>
    <style:style style:default-outline-level="4" style:display-name="Heading 4" style:family="paragraph" style:list-style-name="" style:name="Heading_4" style:next-style-name="Standard">
      <style:paragraph-properties fo:margin-bottom="6pt" fo:margin-top="6pt" fo:text-align="justify"/>
      <style:text-properties fo:font-family="XO Thames" fo:font-size="12pt" fo:font-weight="bold" style:font-name="XO Thames" style:font-size-asian="12pt" style:font-size-complex="12pt" style:font-weight-asian="bold" style:font-weight-complex="bold"/>
    </style:style>
    <style:style style:default-outline-level="2" style:display-name="Heading 2" style:family="paragraph" style:list-style-name="" style:name="Heading_2" style:next-style-name="Standard">
      <style:paragraph-properties fo:margin-bottom="6pt" fo:margin-top="6pt" fo:text-align="justify"/>
      <style:text-properties fo:font-family="XO Thames" fo:font-size="14pt" fo:font-weight="bold" style:font-name="XO Thames" style:font-size-asian="14pt" style:font-size-complex="14pt" style:font-weight-asian="bold" style:font-weight-complex="bold"/>
    </style:style>
    <text:list-style style:name="numList_2">
      <text:list-level-style-bullet text:bullet-char="" text:level="1">
        <style:list-level-properties text:list-level-position-and-space-mode="label-alignment">
          <style:list-level-label-alignment fo:margin-left="36pt" fo:text-indent="-18pt" text:label-followed-by="listtab"/>
        </style:list-level-properties>
        <style:text-properties fo:font-family="Symbol" style:font-name="Symbol"/>
      </text:list-level-style-bullet>
      <text:list-level-style-bullet text:bullet-char="o" text:level="2">
        <style:list-level-properties text:list-level-position-and-space-mode="label-alignment">
          <style:list-level-label-alignment fo:margin-left="72pt" fo:text-indent="-18pt" text:label-followed-by="listtab"/>
        </style:list-level-properties>
        <style:text-properties fo:font-family="Courier New" style:font-name="Courier New"/>
      </text:list-level-style-bullet>
      <text:list-level-style-bullet text:bullet-char="" text:level="3">
        <style:list-level-properties text:list-level-position-and-space-mode="label-alignment">
          <style:list-level-label-alignment fo:margin-left="108pt" fo:text-indent="-18pt" text:label-followed-by="listtab"/>
        </style:list-level-properties>
        <style:text-properties fo:font-family="Wingdings" style:font-name="Wingdings"/>
      </text:list-level-style-bullet>
      <text:list-level-style-bullet text:bullet-char="" text:level="4">
        <style:list-level-properties text:list-level-position-and-space-mode="label-alignment">
          <style:list-level-label-alignment fo:margin-left="144pt" fo:text-indent="-18pt" text:label-followed-by="listtab"/>
        </style:list-level-properties>
        <style:text-properties fo:font-family="Symbol" style:font-name="Symbol"/>
      </text:list-level-style-bullet>
      <text:list-level-style-bullet text:bullet-char="o" text:level="5">
        <style:list-level-properties text:list-level-position-and-space-mode="label-alignment">
          <style:list-level-label-alignment fo:margin-left="180pt" fo:text-indent="-18pt" text:label-followed-by="listtab"/>
        </style:list-level-properties>
        <style:text-properties fo:font-family="Courier New" style:font-name="Courier New"/>
      </text:list-level-style-bullet>
      <text:list-level-style-bullet text:bullet-char="" text:level="6">
        <style:list-level-properties text:list-level-position-and-space-mode="label-alignment">
          <style:list-level-label-alignment fo:margin-left="216pt" fo:text-indent="-18pt" text:label-followed-by="listtab"/>
        </style:list-level-properties>
        <style:text-properties fo:font-family="Wingdings" style:font-name="Wingdings"/>
      </text:list-level-style-bullet>
      <text:list-level-style-bullet text:bullet-char="" text:level="7">
        <style:list-level-properties text:list-level-position-and-space-mode="label-alignment">
          <style:list-level-label-alignment fo:margin-left="252pt" fo:text-indent="-18pt" text:label-followed-by="listtab"/>
        </style:list-level-properties>
        <style:text-properties fo:font-family="Symbol" style:font-name="Symbol"/>
      </text:list-level-style-bullet>
      <text:list-level-style-bullet text:bullet-char="o" text:level="8">
        <style:list-level-properties text:list-level-position-and-space-mode="label-alignment">
          <style:list-level-label-alignment fo:margin-left="288pt" fo:text-indent="-18pt" text:label-followed-by="listtab"/>
        </style:list-level-properties>
        <style:text-properties fo:font-family="Courier New" style:font-name="Courier New"/>
      </text:list-level-style-bullet>
      <text:list-level-style-bullet text:bullet-char="" text:level="9">
        <style:list-level-properties text:list-level-position-and-space-mode="label-alignment">
          <style:list-level-label-alignment fo:margin-left="324pt" fo:text-indent="-18pt" text:label-followed-by="listtab"/>
        </style:list-level-properties>
        <style:text-properties fo:font-family="Wingdings" style:font-name="Wingdings"/>
      </text:list-level-style-bullet>
    </text:list-style>
    <text:list-style style:name="numList_1">
      <text:list-level-style-number style:num-format="1" style:num-prefix="" style:num-suffix="." text:level="1" text:start-value="1">
        <style:list-level-properties text:list-level-position-and-space-mode="label-alignment">
          <style:list-level-label-alignment fo:margin-left="18pt" fo:text-indent="-18pt" text:label-followed-by="listtab"/>
        </style:list-level-properties>
      </text:list-level-style-number>
      <text:list-level-style-number style:num-format="1" style:num-prefix="" style:num-suffix="." text:display-levels="2" text:level="2" text:start-value="1">
        <style:list-level-properties text:list-level-position-and-space-mode="label-alignment">
          <style:list-level-label-alignment fo:margin-left="39.5pt" fo:text-indent="-21.5pt" text:label-followed-by="listtab"/>
        </style:list-level-properties>
      </text:list-level-style-number>
      <text:list-level-style-number style:num-format="1" style:num-prefix="" style:num-suffix="." text:display-levels="3" text:level="3" text:start-value="1">
        <style:list-level-properties text:list-level-position-and-space-mode="label-alignment">
          <style:list-level-label-alignment fo:margin-left="61.25pt" fo:text-indent="-25.25pt" text:label-followed-by="listtab"/>
        </style:list-level-properties>
      </text:list-level-style-number>
      <text:list-level-style-number style:num-format="1" style:num-prefix="" style:num-suffix="." text:display-levels="4" text:level="4" text:start-value="1">
        <style:list-level-properties text:list-level-position-and-space-mode="label-alignment">
          <style:list-level-label-alignment fo:margin-left="86.5pt" fo:text-indent="-32.5pt" text:label-followed-by="listtab"/>
        </style:list-level-properties>
      </text:list-level-style-number>
      <text:list-level-style-number style:num-format="1" style:num-prefix="" style:num-suffix="." text:display-levels="5" text:level="5" text:start-value="1">
        <style:list-level-properties text:list-level-position-and-space-mode="label-alignment">
          <style:list-level-label-alignment fo:margin-left="111.5pt" fo:text-indent="-39.5pt" text:label-followed-by="listtab"/>
        </style:list-level-properties>
      </text:list-level-style-number>
      <text:list-level-style-number style:num-format="1" style:num-prefix="" style:num-suffix="." text:display-levels="6" text:level="6" text:start-value="1">
        <style:list-level-properties text:list-level-position-and-space-mode="label-alignment">
          <style:list-level-label-alignment fo:margin-left="136.75pt" fo:text-indent="-46.75pt" text:label-followed-by="listtab"/>
        </style:list-level-properties>
      </text:list-level-style-number>
      <text:list-level-style-number style:num-format="1" style:num-prefix="" style:num-suffix="." text:display-levels="7" text:level="7" text:start-value="1">
        <style:list-level-properties text:list-level-position-and-space-mode="label-alignment">
          <style:list-level-label-alignment fo:margin-left="162pt" fo:text-indent="-54pt" text:label-followed-by="listtab"/>
        </style:list-level-properties>
      </text:list-level-style-number>
      <text:list-level-style-number style:num-format="1" style:num-prefix="" style:num-suffix="." text:display-levels="8" text:level="8" text:start-value="1">
        <style:list-level-properties text:list-level-position-and-space-mode="label-alignment">
          <style:list-level-label-alignment fo:margin-left="187.25pt" fo:text-indent="-61.25pt" text:label-followed-by="listtab"/>
        </style:list-level-properties>
      </text:list-level-style-number>
      <text:list-level-style-number style:num-format="1" style:num-prefix="" style:num-suffix="." text:display-levels="9" text:level="9" text:start-value="1">
        <style:list-level-properties text:list-level-position-and-space-mode="label-alignment">
          <style:list-level-label-alignment fo:margin-left="216pt" fo:text-indent="-72pt" text:label-followed-by="listtab"/>
        </style:list-level-properties>
      </text:list-level-style-number>
    </text:list-style>
    <style:style style:family="graphic" style:name="Frame">
      <style:graphic-properties text:anchor-type="paragraph"/>
    </style:style>
  </office:styles>
  <office:automatic-styles>
    <style:page-layout style:name="PM1">
      <style:page-layout-properties fo:margin-bottom="56.6928pt" fo:margin-left="65.196pt" fo:margin-right="36.8496pt" fo:margin-top="56.6928pt" fo:page-height="841.8888pt" fo:page-width="595.3032pt" style:num-format="1"/>
    </style:page-layout>
  </office:automatic-styles>
  <office:master-styles>
    <style:master-page style:name="Standard" style:page-layout-name="PM1">
      <style:header style:display="false"/>
      <style:footer style:display="false"/>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2">
  <office:meta>
    <meta:generator>MyOffice-CoreFramework-Windows/29</meta:generator>
    <dc:date>2026-06-22T17:26:55Z</dc:date>
  </office:meta>
</office:document-meta>
</file>

<file path=themes.xml><?xml version="1.0" encoding="utf-8"?>
<co:themes xmlns:a="http://schemas.openxmlformats.org/drawingml/2006/main" xmlns:a15="http://schemas.microsoft.com/office/drawing/2012/main" xmlns:asvg="http://schemas.microsoft.com/office/drawing/2016/SVG/main" xmlns:c="http://schemas.openxmlformats.org/drawingml/2006/chart" xmlns:co="http://ncloudtech.com" xmlns:co-ooxml="http://ncloudtech.com/ooxml" xmlns:m="http://schemas.openxmlformats.org/officeDocument/2006/math" xmlns:mc="http://schemas.openxmlformats.org/markup-compatibility/2006" xmlns:o="urn:schemas-microsoft-com:office:office" xmlns:p="http://schemas.openxmlformats.org/presentationml/2006/main" xmlns:pic="http://schemas.openxmlformats.org/drawingml/2006/picture" xmlns:r="http://schemas.openxmlformats.org/officeDocument/2006/relationships" xmlns:s="http://schemas.openxmlformats.org/officeDocument/2006/sharedTypes" xmlns:sl="http://schemas.openxmlformats.org/schemaLibrary/2006/main" xmlns:v="urn:schemas-microsoft-com:vml" xmlns:w="http://schemas.openxmlformats.org/wordprocessingml/2006/main" xmlns:w10="urn:schemas-microsoft-com:office:word" xmlns:w14="http://schemas.microsoft.com/office/word/2010/wordml" xmlns:w15="http://schemas.microsoft.com/office/word/2012/wordml" xmlns:wp="http://schemas.openxmlformats.org/drawingml/2006/wordprocessingDrawing" xmlns:wpg="http://schemas.microsoft.com/office/word/2010/wordprocessingGroup" xmlns:wps="http://schemas.microsoft.com/office/word/2010/wordprocessingShape" xmlns:x="urn:schemas-microsoft-com:office:excel" xmlns:x14="http://schemas.microsoft.com/office/spreadsheetml/2009/9/main" xmlns:xdr="http://schemas.openxmlformats.org/drawingml/2006/spreadsheetDrawing" xmlns:xm="http://schemas.microsoft.com/office/excel/2006/main">
  <co:theme name="Office Theme" styleName="Theme1">
    <a:themeElements>
      <a:clrScheme name="Office">
        <a:dk1>
          <a:srgbClr val="000000"/>
        </a:dk1>
        <a:lt1>
          <a:srgbClr val="FFFFFF"/>
        </a:lt1>
        <a:dk2>
          <a:srgbClr val="1F497D"/>
        </a:dk2>
        <a:lt2>
          <a:srgbClr val="EEECE1"/>
        </a:lt2>
        <a:accent1>
          <a:srgbClr val="4F81BD"/>
        </a:accent1>
        <a:accent2>
          <a:srgbClr val="C0504D"/>
        </a:accent2>
        <a:accent3>
          <a:srgbClr val="9BBB59"/>
        </a:accent3>
        <a:accent4>
          <a:srgbClr val="8064A2"/>
        </a:accent4>
        <a:accent5>
          <a:srgbClr val="4BACC6"/>
        </a:accent5>
        <a:accent6>
          <a:srgbClr val="F79646"/>
        </a:accent6>
        <a:hlink>
          <a:srgbClr val="0000FF"/>
        </a:hlink>
        <a:folHlink>
          <a:srgbClr val="800080"/>
        </a:folHlink>
      </a:clrScheme>
      <a:fontScheme name="Office">
        <a:majorFont>
          <a:latin typeface="XO Thames"/>
          <a:ea typeface=""/>
          <a:cs typeface=""/>
        </a:majorFont>
        <a:minorFont>
          <a:latin typeface="XO Thames"/>
          <a:ea typeface=""/>
          <a:cs typeface=""/>
        </a:minorFont>
      </a:fontScheme>
      <a:fmtScheme name="Office">
        <a:fillStyleLst>
          <a:solidFill>
            <a:schemeClr val="phClr"/>
          </a:solidFill>
          <a:gradFill>
            <a:gsLst>
              <a:gs pos="0">
                <a:schemeClr val="phClr">
                  <a:tint val="50000"/>
                  <a:satMod val="300000"/>
                </a:schemeClr>
              </a:gs>
              <a:gs pos="35000">
                <a:schemeClr val="phClr">
                  <a:tint val="63000"/>
                  <a:satMod val="300000"/>
                </a:schemeClr>
              </a:gs>
              <a:gs pos="100000">
                <a:schemeClr val="phClr">
                  <a:tint val="85000"/>
                  <a:satMod val="350000"/>
                </a:schemeClr>
              </a:gs>
            </a:gsLst>
          </a:gradFill>
          <a:gradFill>
            <a:gsLst>
              <a:gs pos="0">
                <a:schemeClr val="phClr">
                  <a:shade val="51000"/>
                  <a:satMod val="130000"/>
                </a:schemeClr>
              </a:gs>
              <a:gs pos="80000">
                <a:schemeClr val="phClr">
                  <a:shade val="93000"/>
                  <a:satMod val="130000"/>
                </a:schemeClr>
              </a:gs>
              <a:gs pos="100000">
                <a:schemeClr val="phClr">
                  <a:shade val="94000"/>
                  <a:satMod val="135000"/>
                </a:schemeClr>
              </a:gs>
            </a:gsLst>
          </a:gradFill>
        </a:fillStyleLst>
        <a:lnStyleLst>
          <a:ln>
            <a:solidFill>
              <a:schemeClr val="phClr">
                <a:shade val="95000"/>
                <a:satMod val="105000"/>
              </a:schemeClr>
            </a:solidFill>
          </a:ln>
          <a:ln>
            <a:solidFill>
              <a:schemeClr val="phClr"/>
            </a:solidFill>
          </a:ln>
          <a:ln>
            <a:solidFill>
              <a:schemeClr val="phClr"/>
            </a:solidFill>
          </a:ln>
        </a:lnStyleLst>
        <a:effectStyleLst>
          <a:effectStyle>
            <a:effectLst>
              <a:outerShdw>
                <a:srgbClr val="000000">
                  <a:alpha val="38000"/>
                </a:srgbClr>
              </a:outerShdw>
            </a:effectLst>
          </a:effectStyle>
          <a:effectStyle>
            <a:effectLst>
              <a:outerShdw>
                <a:srgbClr val="000000">
                  <a:alpha val="35000"/>
                </a:srgbClr>
              </a:outerShdw>
            </a:effectLst>
          </a:effectStyle>
          <a:effectStyle>
            <a:effectLst>
              <a:outerShdw>
                <a:srgbClr val="000000">
                  <a:alpha val="35000"/>
                </a:srgbClr>
              </a:outerShdw>
            </a:effectLst>
          </a:effectStyle>
        </a:effectStyleLst>
        <a:bgFillStyleLst>
          <a:solidFill>
            <a:schemeClr val="phClr"/>
          </a:solidFill>
          <a:gradFill>
            <a:gsLst>
              <a:gs pos="0">
                <a:schemeClr val="phClr">
                  <a:tint val="60000"/>
                  <a:satMod val="350000"/>
                </a:schemeClr>
              </a:gs>
              <a:gs pos="40000">
                <a:schemeClr val="phClr">
                  <a:tint val="55000"/>
                  <a:shade val="99000"/>
                  <a:satMod val="350000"/>
                </a:schemeClr>
              </a:gs>
              <a:gs pos="100000">
                <a:schemeClr val="phClr">
                  <a:shade val="20000"/>
                  <a:satMod val="255000"/>
                </a:schemeClr>
              </a:gs>
            </a:gsLst>
          </a:gradFill>
          <a:gradFill>
            <a:gsLst>
              <a:gs pos="0">
                <a:schemeClr val="phClr">
                  <a:tint val="20000"/>
                  <a:satMod val="300000"/>
                </a:schemeClr>
              </a:gs>
              <a:gs pos="100000">
                <a:schemeClr val="phClr">
                  <a:shade val="30000"/>
                  <a:satMod val="200000"/>
                </a:schemeClr>
              </a:gs>
            </a:gsLst>
          </a:gradFill>
        </a:bgFillStyleLst>
      </a:fmtScheme>
    </a:themeElements>
    <co:colorMap accent1="accent1" accent2="accent2" accent3="accent3" accent4="accent4" accent5="accent5" accent6="accent6" bg1="lt1" bg2="lt2" folHlink="folHlink" hlink="hlink" tx1="dk1" tx2="dk2"/>
  </co:theme>
</co:themes>
</file>